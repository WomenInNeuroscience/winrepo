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D000001517C0CD632.png" manifest:media-type="image/png"/>
  <manifest:file-entry manifest:full-path="Pictures/10000001000002ED000002BCE9411863.png" manifest:media-type="image/png"/>
  <manifest:file-entry manifest:full-path="Pictures/10000001000003B50000034959494731.png" manifest:media-type="image/png"/>
  <manifest:file-entry manifest:full-path="Pictures/1000000100000614000003D4972588BA.png" manifest:media-type="image/png"/>
  <manifest:file-entry manifest:full-path="Pictures/1000000100000200000002000A94AF65.png" manifest:media-type="image/png"/>
  <manifest:file-entry manifest:full-path="Pictures/1000000000000123000000E43BE183F8.jpg" manifest:media-type="image/jpeg"/>
  <manifest:file-entry manifest:full-path="Pictures/10000000000000DE000000DE3ED2F66F.jpg" manifest:media-type="image/jpeg"/>
  <manifest:file-entry manifest:full-path="Pictures/10000000000000DC000000D53FF9E868.jpg" manifest:media-type="image/jpeg"/>
  <manifest:file-entry manifest:full-path="Pictures/10000000000001F4000000D1B4145CE0.jpg" manifest:media-type="image/jpeg"/>
  <manifest:file-entry manifest:full-path="Pictures/1000000100000301000000C09069EB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0000" draw:opacity="0%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10000" draw:opacity="0%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7.10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0.85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5.91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9.76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4.64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538cm" fo:min-width="21.99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9.88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77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2.99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7.60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44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10.33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1.88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5.6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6.60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010000" draw:opacity="0%"/>
    </style:style>
    <style:style style:name="P6" style:family="paragraph">
      <loext:graphic-properties draw:fill="none"/>
      <style:paragraph-properties fo:text-align="start"/>
      <style:text-properties style:font-name="Noto Sans" fo:font-size="24pt" style:text-underline-style="solid" style:text-underline-width="auto" style:text-underline-color="font-color" style:font-size-asian="24pt" style:font-size-complex="24pt"/>
    </style:style>
    <style:style style:name="P7" style:family="paragraph">
      <loext:graphic-properties draw:fill="none"/>
      <style:text-properties fo:font-size="24.2000007629395pt" style:font-size-asian="24.2000007629395pt" style:font-size-complex="24.2000007629395pt"/>
    </style:style>
    <style:style style:name="P8" style:family="paragraph">
      <loext:graphic-properties draw:fill="none"/>
      <style:text-properties style:font-name="Noto Sans" fo:font-size="24.2000007629395pt" style:font-size-asian="24.2000007629395pt" style:font-size-complex="24.2000007629395pt"/>
    </style:style>
    <style:style style:name="P9" style:family="paragraph">
      <loext:graphic-properties draw:fill="none"/>
      <style:paragraph-properties fo:text-align="start"/>
      <style:text-properties style:font-name="Noto Sans" fo:font-size="24pt" style:font-size-asian="24pt" style:font-size-complex="24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style:font-name="Noto Sans" fo:font-size="32pt" style:font-size-asian="32pt" style:font-size-complex="32pt"/>
    </style:style>
    <style:style style:name="P12" style:family="paragraph">
      <loext:graphic-properties draw:fill="none"/>
      <style:text-properties style:font-name="Noto Sans" fo:font-size="28pt" style:font-size-asian="28pt" style:font-size-complex="28pt"/>
    </style:style>
    <style:style style:name="P13" style:family="paragraph">
      <loext:graphic-properties draw:fill="none"/>
      <style:text-properties fo:font-size="22pt" style:font-size-asian="22pt" style:font-size-complex="22pt"/>
    </style:style>
    <style:style style:name="P14" style:family="paragraph">
      <loext:graphic-properties draw:fill="none"/>
      <style:text-properties style:font-name="Noto Sans" fo:font-size="24pt" style:font-size-asian="24pt" style:font-size-complex="24pt"/>
    </style:style>
    <style:style style:name="P15" style:family="paragraph">
      <loext:graphic-properties draw:fill="none"/>
      <style:text-properties style:font-name="Noto Sans" fo:font-size="16pt" style:text-underline-style="none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/>
      <style:text-properties style:font-name="Noto Sans" fo:font-size="16pt" style:text-underline-style="solid" style:text-underline-width="auto" style:text-underline-color="font-color" style:font-size-asian="16pt" style:font-size-complex="16pt"/>
    </style:style>
    <style:style style:name="P19" style:family="paragraph">
      <style:paragraph-properties fo:margin-top="0.42cm" fo:margin-bottom="0.35cm" fo:text-align="start" style:writing-mode="lr-tb"/>
    </style:style>
    <style:style style:name="P20" style:family="paragraph">
      <loext:graphic-properties draw:fill="none"/>
      <style:text-properties style:font-name="Noto Sans" fo:font-size="16pt" style:font-size-asian="16pt" style:font-size-complex="16pt"/>
    </style:style>
    <style:style style:name="P21" style:family="paragraph">
      <style:paragraph-properties fo:text-align="center"/>
    </style:style>
    <style:style style:name="T1" style:family="text">
      <style:text-properties fo:color="#000000" loext:opacity="100%"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T2" style:family="text">
      <style:text-properties fo:color="#0000ff" loext:opacity="100%" style:font-name="Noto Sans" fo:font-size="24pt" style:text-underline-style="solid" style:text-underline-width="auto" style:text-underline-color="font-color" fo:font-weight="normal" style:font-name-asian="Calibri" style:font-size-asian="24pt" style:font-weight-asian="normal" style:font-name-complex="Calibri" style:font-size-complex="24pt" style:font-weight-complex="normal"/>
    </style:style>
    <style:style style:name="T3" style:family="text">
      <style:text-properties fo:color="#000000" loext:opacity="100%" style:font-name="Arial" fo:font-size="24.2000007629395pt" fo:font-weight="normal" style:font-name-asian="Arial" style:font-size-asian="24.2000007629395pt" style:font-weight-asian="normal" style:font-name-complex="Arial" style:font-size-complex="24.2000007629395pt" style:font-weight-complex="normal"/>
    </style:style>
    <style:style style:name="T4" style:family="text">
      <style:text-properties fo:color="#000000" loext:opacity="100%" style:font-name="Noto Sans" fo:font-size="24.2000007629395pt" fo:font-weight="normal" style:font-name-asian="Calibri" style:font-size-asian="24.2000007629395pt" style:font-weight-asian="normal" style:font-name-complex="Calibri" style:font-size-complex="24.2000007629395pt" style:font-weight-complex="normal"/>
    </style:style>
    <style:style style:name="T5" style:family="text">
      <style:text-properties fo:color="#000000" loext:opacity="100%" style:font-name="Noto Sans" fo:font-size="24.2000007629395pt" fo:font-weight="bold" style:font-name-asian="Calibri" style:font-size-asian="24.2000007629395pt" style:font-weight-asian="bold" style:font-name-complex="Calibri" style:font-size-complex="24.2000007629395pt" style:font-weight-complex="bold"/>
    </style:style>
    <style:style style:name="T6" style:family="text">
      <style:text-properties fo:color="#000000" loext:opacity="100%" style:font-name="Arial" fo:font-size="24.2000007629395pt" fo:font-weight="bold" style:font-name-asian="Arial" style:font-size-asian="24.2000007629395pt" style:font-weight-asian="bold" style:font-name-complex="Arial" style:font-size-complex="24.2000007629395pt" style:font-weight-complex="bold"/>
    </style:style>
    <style:style style:name="T7" style:family="text">
      <style:text-properties fo:color="#000000" loext:opacity="100%" style:font-name="Noto Sans" fo:font-size="24pt" fo:font-weight="normal" style:font-name-asian="Calibri" style:font-size-asian="24pt" style:font-weight-asian="normal" style:font-name-complex="Calibri" style:font-size-complex="24pt" style:font-weight-complex="normal"/>
    </style:style>
    <style:style style:name="T8" style:family="text">
      <style:text-properties fo:color="#555555" loext:opacity="100%" style:font-name="Noto Sans" fo:font-size="32pt" fo:font-weight="bold" style:font-name-asian="Calibri" style:font-size-asian="32pt" style:font-weight-asian="bold" style:font-name-complex="Calibri" style:font-size-complex="32pt" style:font-weight-complex="bold"/>
    </style:style>
    <style:style style:name="T9" style:family="text">
      <style:text-properties fo:color="#cc063e" loext:opacity="100%" style:font-name="Noto Sans" fo:font-size="28pt" fo:font-weight="bold" style:font-name-asian="Calibri" style:font-size-asian="28pt" style:font-weight-asian="bold" style:font-name-complex="Calibri" style:font-size-complex="28pt" style:font-weight-complex="bold"/>
    </style:style>
    <style:style style:name="T10" style:family="text">
      <style:text-properties fo:color="#000000" loext:opacity="100%" style:font-name="Arial" fo:font-size="22pt" fo:font-weight="normal" style:font-name-asian="Arial" style:font-size-asian="22pt" style:font-weight-asian="normal" style:font-name-complex="Arial" style:font-size-complex="22pt" style:font-weight-complex="normal"/>
    </style:style>
    <style:style style:name="T11" style:family="text">
      <style:text-properties fo:color="#000000" loext:opacity="100%" style:font-name="Calibri" fo:font-size="22pt" fo:font-weight="normal" style:font-name-asian="Calibri" style:font-size-asian="22pt" style:font-weight-asian="normal" style:font-name-complex="Calibri" style:font-size-complex="22pt" style:font-weight-complex="normal"/>
    </style:style>
    <style:style style:name="T12" style:family="text">
      <style:text-properties fo:color="#0000ff" loext:opacity="100%" style:font-name="Noto Sans" fo:font-size="16pt" style:text-underline-style="solid" style:text-underline-width="auto" style:text-underline-color="font-color" fo:font-weight="normal" style:font-name-asian="Calibri" style:font-size-asian="16pt" style:font-weight-asian="normal" style:font-name-complex="Calibri" style:font-size-complex="16pt" style:font-weight-complex="normal"/>
    </style:style>
    <style:style style:name="T13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14" style:family="text">
      <style:text-properties fo:color="#0000ff" loext:opacity="100%" style:font-name="Noto Sans" fo:font-size="16pt" fo:font-weight="normal" style:font-name-asian="Calibri" style:font-size-asian="16pt" style:font-weight-asian="normal" style:font-name-complex="Calibri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12.651cm" svg:height="8.03cm" svg:x="12.325cm" svg:y="9.383cm" svg:viewBox="0 0 12652 8031" draw:points="0,0 12652,0 12652,8031 0,8031">
          <text:p/>
        </draw:polygon>
        <draw:polygon draw:style-name="gr2" draw:text-style-name="P2" draw:layer="layout" svg:width="11.468cm" svg:height="4.81cm" svg:x="0.857cm" svg:y="4.584cm" svg:viewBox="0 0 11469 4811" draw:points="0,0 11469,0 11469,4811 0,4811">
          <text:p/>
        </draw:polygon>
        <draw:polygon draw:style-name="gr2" draw:text-style-name="P2" draw:layer="layout" svg:width="6.137cm" svg:height="1.034cm" svg:x="2.365cm" svg:y="4.786cm" svg:viewBox="0 0 6138 1035" draw:points="0,0 6138,0 6138,1035 0,1035">
          <text:p/>
        </draw:polygon>
        <draw:frame draw:style-name="gr3" draw:text-style-name="P4" draw:layer="layout" svg:width="0.846cm" svg:height="0.945cm" svg:x="1.219cm" svg:y="4.656cm">
          <draw:text-box>
            <text:p text:style-name="P3"><text:span text:style-name="T1">○</text:span></text:p>
          </draw:text-box>
        </draw:frame>
        <draw:polygon draw:style-name="gr4" draw:text-style-name="P5" draw:layer="layout" svg:width="0cm" svg:height="1.033cm" svg:x="8.502cm" svg:y="4.786cm" svg:viewBox="0 0 0 1034" draw:points="0,0 0,1034">
          <text:p/>
        </draw:polygon>
        <draw:a xlink:href="https://www.linkedin.com/groups/12659766" xlink:type="simple" xlink:show="embed">
          <draw:frame draw:style-name="gr5" draw:text-style-name="P6" draw:layer="layout" svg:width="7.101cm" svg:height="1.157cm" svg:x="2.322cm" svg:y="4.558cm">
            <draw:text-box>
              <text:p text:style-name="P3"><text:span text:style-name="T2">www.winrepo.org</text:span></text:p>
            </draw:text-box>
          </draw:frame>
        </draw:a>
        <draw:frame draw:style-name="gr6" draw:text-style-name="P7" draw:layer="layout" svg:width="0.853cm" svg:height="0.958cm" svg:x="1.215cm" svg:y="5.817cm">
          <draw:text-box>
            <text:p text:style-name="P3"><text:span text:style-name="T3">○</text:span></text:p>
          </draw:text-box>
        </draw:frame>
        <draw:frame draw:style-name="gr7" draw:text-style-name="P8" draw:layer="layout" svg:width="5.912cm" svg:height="1.165cm" svg:x="2.365cm" svg:y="5.777cm">
          <draw:text-box>
            <text:p text:style-name="P3"><text:span text:style-name="T4">&gt; </text:span><text:span text:style-name="T5">2060 </text:span><text:span text:style-name="T4">profiles</text:span></text:p>
          </draw:text-box>
        </draw:frame>
        <draw:frame draw:style-name="gr6" draw:text-style-name="P7" draw:layer="layout" svg:width="0.853cm" svg:height="0.958cm" svg:x="1.215cm" svg:y="6.987cm">
          <draw:text-box>
            <text:p text:style-name="P3"><text:span text:style-name="T6">○</text:span></text:p>
          </draw:text-box>
        </draw:frame>
        <draw:frame draw:style-name="gr8" draw:text-style-name="P8" draw:layer="layout" svg:width="9.764cm" svg:height="1.165cm" svg:x="2.365cm" svg:y="6.947cm">
          <draw:text-box>
            <text:p text:style-name="P3"><text:span text:style-name="T4">&gt; </text:span><text:span text:style-name="T5">120 </text:span><text:span text:style-name="T4">recommendations</text:span></text:p>
          </draw:text-box>
        </draw:frame>
        <draw:frame draw:style-name="gr6" draw:text-style-name="P7" draw:layer="layout" svg:width="0.853cm" svg:height="0.958cm" svg:x="1.215cm" svg:y="8.157cm">
          <draw:text-box>
            <text:p text:style-name="P3"><text:span text:style-name="T3">○</text:span></text:p>
          </draw:text-box>
        </draw:frame>
        <draw:polygon draw:style-name="gr2" draw:text-style-name="P2" draw:layer="layout" svg:width="20.226cm" svg:height="1.625cm" svg:x="3.598cm" svg:y="2.328cm" svg:viewBox="0 0 20227 1626" draw:points="0,0 20227,0 20227,1626 0,1626">
          <text:p/>
        </draw:polygon>
        <draw:frame draw:style-name="gr9" draw:text-style-name="P9" draw:layer="layout" svg:width="4.642cm" svg:height="1.157cm" svg:x="2.365cm" svg:y="8.123cm">
          <draw:text-box>
            <text:p text:style-name="P3"><text:span text:style-name="T7">Easy search</text:span></text:p>
          </draw:text-box>
        </draw:frame>
        <draw:polygon draw:style-name="gr2" draw:text-style-name="P2" draw:layer="layout" svg:width="5.917cm" svg:height="1.479cm" svg:x="0.224cm" svg:y="0.217cm" svg:viewBox="0 0 5918 1480" draw:points="0,0 5918,0 5918,1480 0,1480">
          <text:p/>
        </draw:polygon>
        <draw:frame draw:style-name="gr10" draw:text-style-name="P10" draw:layer="layout" svg:width="5.915cm" svg:height="1.478cm" svg:x="0.225cm" svg:y="0.218cm">
          <draw:image xlink:href="Pictures/1000000100000301000000C09069EB8B.png" xlink:type="simple" xlink:show="embed" xlink:actuate="onLoad" draw:mime-type="image/png">
            <text:p/>
          </draw:image>
        </draw:frame>
        <draw:polygon draw:style-name="gr2" draw:text-style-name="P2" draw:layer="layout" svg:width="1.142cm" svg:height="1.106cm" svg:x="22.439cm" svg:y="17.625cm" svg:viewBox="0 0 1143 1107" draw:points="0,0 1143,0 1143,1107 0,1107">
          <text:p/>
        </draw:polygon>
        <draw:frame draw:style-name="gr10" draw:text-style-name="P10" draw:layer="layout" svg:width="1.141cm" svg:height="1.105cm" svg:x="22.44cm" svg:y="17.626cm">
          <draw:image xlink:href="Pictures/10000000000000DC000000D53FF9E868.jpg" xlink:type="simple" xlink:show="embed" xlink:actuate="onLoad" draw:mime-type="image/jpeg">
            <text:p/>
          </draw:image>
        </draw:frame>
        <draw:polygon draw:style-name="gr2" draw:text-style-name="P2" draw:layer="layout" svg:width="1.218cm" svg:height="0.991cm" svg:x="23.869cm" svg:y="17.625cm" svg:viewBox="0 0 1219 992" draw:points="0,0 1219,0 1219,992 0,992">
          <text:p/>
        </draw:polygon>
        <draw:frame draw:style-name="gr10" draw:text-style-name="P10" draw:layer="layout" svg:width="1.377cm" svg:height="1.141cm" svg:x="23.869cm" svg:y="17.626cm">
          <draw:image xlink:href="Pictures/10000000000000DE000000DE3ED2F66F.jpg" xlink:type="simple" xlink:show="embed" xlink:actuate="onLoad" draw:mime-type="image/jpeg">
            <text:p/>
          </draw:image>
        </draw:frame>
        <draw:polygon draw:style-name="gr2" draw:text-style-name="P2" draw:layer="layout" svg:width="3.079cm" svg:height="1.287cm" svg:x="19.084cm" svg:y="17.625cm" svg:viewBox="0 0 3080 1288" draw:points="0,0 3080,0 3080,1288 0,1288">
          <text:p/>
        </draw:polygon>
        <draw:frame draw:style-name="gr10" draw:text-style-name="P10" draw:layer="layout" svg:width="3.078cm" svg:height="1.286cm" svg:x="19.085cm" svg:y="17.626cm">
          <draw:image xlink:href="Pictures/10000000000001F4000000D1B4145CE0.jpg" xlink:type="simple" xlink:show="embed" xlink:actuate="onLoad" draw:mime-type="image/jpeg">
            <text:p/>
          </draw:image>
        </draw:frame>
        <draw:polygon draw:style-name="gr2" draw:text-style-name="P2" draw:layer="layout" svg:width="3.774cm" svg:height="1.197cm" svg:x="10.354cm" svg:y="15.392cm" svg:viewBox="0 0 3775 1198" draw:points="0,0 3775,0 3775,1198 0,1198">
          <text:p/>
        </draw:polygon>
        <draw:frame draw:style-name="gr11" draw:text-style-name="P11" draw:layer="layout" svg:width="21.998cm" svg:height="1.538cm" svg:x="2.237cm" svg:y="2.443cm">
          <draw:text-box>
            <text:p text:style-name="P3"><text:span text:style-name="T8">Repository for Women in Neuroscience</text:span></text:p>
          </draw:text-box>
        </draw:frame>
        <draw:polygon draw:style-name="gr2" draw:text-style-name="P2" draw:layer="layout" svg:width="0.901cm" svg:height="0.858cm" svg:x="9.719cm" svg:y="15.562cm" svg:viewBox="0 0 902 859" draw:points="0,0 902,0 902,859 0,859">
          <text:p/>
        </draw:polygon>
        <draw:polygon draw:style-name="gr2" draw:text-style-name="P2" draw:layer="layout" svg:width="14.036cm" svg:height="5.473cm" svg:x="0.961cm" svg:y="9.652cm" svg:viewBox="0 0 14037 5474" draw:points="0,0 14037,0 14037,5474 0,5474">
          <text:p/>
        </draw:polygon>
        <draw:frame draw:style-name="gr12" draw:text-style-name="P12" draw:layer="layout" svg:width="9.883cm" svg:height="1.343cm" svg:x="1.199cm" svg:y="9.766cm">
          <draw:text-box>
            <text:p text:style-name="P3"><text:span text:style-name="T9">Support the project:</text:span></text:p>
          </draw:text-box>
        </draw:frame>
        <draw:frame draw:style-name="gr13" draw:text-style-name="P13" draw:layer="layout" svg:width="0.775cm" svg:height="0.869cm" svg:x="1.225cm" svg:y="11.478cm">
          <draw:text-box>
            <text:p text:style-name="P3"><text:span text:style-name="T10">○</text:span></text:p>
          </draw:text-box>
        </draw:frame>
        <draw:frame draw:style-name="gr14" draw:text-style-name="P13" draw:layer="layout" svg:width="0.775cm" svg:height="0.945cm" svg:x="1.993cm" svg:y="11.441cm">
          <draw:text-box>
            <text:p text:style-name="P3"><text:span text:style-name="T11"><text:s text:c="2"/></text:span></text:p>
          </draw:text-box>
        </draw:frame>
        <draw:frame draw:style-name="gr15" draw:text-style-name="P14" draw:layer="layout" svg:width="2.991cm" svg:height="1.157cm" svg:x="2.344cm" svg:y="11.374cm">
          <draw:text-box>
            <text:p text:style-name="P3"><text:span text:style-name="T7">Sign up</text:span></text:p>
          </draw:text-box>
        </draw:frame>
        <draw:frame draw:style-name="gr13" draw:text-style-name="P13" draw:layer="layout" svg:width="0.775cm" svg:height="0.869cm" svg:x="1.225cm" svg:y="12.748cm">
          <draw:text-box>
            <text:p text:style-name="P3"><text:span text:style-name="T10">○</text:span></text:p>
          </draw:text-box>
        </draw:frame>
        <draw:frame draw:style-name="gr14" draw:text-style-name="P13" draw:layer="layout" svg:width="0.775cm" svg:height="0.945cm" svg:x="1.993cm" svg:y="12.711cm">
          <draw:text-box>
            <text:p text:style-name="P3"><text:span text:style-name="T11"><text:s text:c="2"/></text:span></text:p>
          </draw:text-box>
        </draw:frame>
        <draw:frame draw:style-name="gr13" draw:text-style-name="P13" draw:layer="layout" svg:width="0.775cm" svg:height="0.869cm" svg:x="1.225cm" svg:y="14.018cm">
          <draw:text-box>
            <text:p text:style-name="P3"><text:span text:style-name="T10">○</text:span></text:p>
          </draw:text-box>
        </draw:frame>
        <draw:frame draw:style-name="gr14" draw:text-style-name="P13" draw:layer="layout" svg:width="0.775cm" svg:height="0.945cm" svg:x="1.993cm" svg:y="13.981cm">
          <draw:text-box>
            <text:p text:style-name="P3"><text:span text:style-name="T11"><text:s text:c="2"/></text:span></text:p>
          </draw:text-box>
        </draw:frame>
        <draw:polygon draw:style-name="gr2" draw:text-style-name="P2" draw:layer="layout" svg:width="1.095cm" svg:height="0.858cm" svg:x="1.083cm" svg:y="17.956cm" svg:viewBox="0 0 1096 859" draw:points="0,0 1096,0 1096,859 0,859">
          <text:p/>
        </draw:polygon>
        <draw:frame draw:style-name="gr10" draw:text-style-name="P10" draw:layer="layout" svg:width="1.094cm" svg:height="0.857cm" svg:x="1.083cm" svg:y="17.956cm">
          <draw:image xlink:href="Pictures/1000000000000123000000E43BE183F8.jpg" xlink:type="simple" xlink:show="embed" xlink:actuate="onLoad" draw:mime-type="image/jpeg">
            <text:p/>
          </draw:image>
        </draw:frame>
        <draw:polygon draw:style-name="gr2" draw:text-style-name="P2" draw:layer="layout" svg:width="7.315cm" svg:height="1.198cm" svg:x="2.178cm" svg:y="17.67cm" svg:viewBox="0 0 7316 1199" draw:points="0,0 7316,0 7316,1199 0,1199">
          <text:p/>
        </draw:polygon>
        <draw:polygon draw:style-name="gr2" draw:text-style-name="P2" draw:layer="layout" svg:width="6.613cm" svg:height="0.689cm" svg:x="2.416cm" svg:y="18.027cm" svg:viewBox="0 0 6614 690" draw:points="0,0 6614,0 6614,690 0,690">
          <text:p/>
        </draw:polygon>
        <draw:polygon draw:style-name="gr4" draw:text-style-name="P5" draw:layer="layout" svg:width="0cm" svg:height="0.688cm" svg:x="9.029cm" svg:y="18.027cm" svg:viewBox="0 0 0 689" draw:points="0,0 0,689">
          <text:p/>
        </draw:polygon>
        <draw:polygon draw:style-name="gr2" draw:text-style-name="P2" draw:layer="layout" svg:width="13.022cm" svg:height="4.121cm" svg:x="12.251cm" svg:y="4.839cm" svg:viewBox="0 0 13023 4122" draw:points="0,0 13023,0 13023,4122 0,4122">
          <text:p/>
        </draw:polygon>
        <draw:polygon draw:style-name="gr2" draw:text-style-name="P2" draw:layer="layout" svg:width="11.315cm" svg:height="1.197cm" svg:x="2.166cm" svg:y="16.589cm" svg:viewBox="0 0 11316 1198" draw:points="0,0 11316,0 11316,1198 0,1198">
          <text:p/>
        </draw:polygon>
        <draw:polygon draw:style-name="gr2" draw:text-style-name="P2" draw:layer="layout" svg:width="10.499cm" svg:height="0.688cm" svg:x="2.404cm" svg:y="16.946cm" svg:viewBox="0 0 10500 689" draw:points="0,0 10500,0 10500,689 0,689">
          <text:p/>
        </draw:polygon>
        <draw:frame draw:style-name="gr16" draw:text-style-name="P15" draw:layer="layout" svg:width="7.601cm" svg:height="0.767cm" svg:x="2.441cm" svg:y="17.965cm">
          <draw:text-box>
            <text:p text:style-name="P3"><text:span text:style-name="T12"><text:a xlink:href="https://www.linkedin.com/groups/12659766" xlink:type="simple">https://discord.gg/YHc9g3rN</text:a></text:span></text:p>
          </draw:text-box>
        </draw:frame>
        <draw:polygon draw:style-name="gr4" draw:text-style-name="P5" draw:layer="layout" svg:width="0cm" svg:height="0.687cm" svg:x="12.903cm" svg:y="16.946cm" svg:viewBox="0 0 0 688" draw:points="0,0 0,688">
          <text:p/>
        </draw:polygon>
        <draw:polygon draw:style-name="gr2" draw:text-style-name="P2" draw:layer="layout" svg:width="0.901cm" svg:height="0.901cm" svg:x="1.172cm" svg:y="16.838cm" svg:viewBox="0 0 902 902" draw:points="0,0 902,0 902,902 0,902">
          <text:p/>
        </draw:polygon>
        <draw:frame draw:style-name="gr10" draw:text-style-name="P10" draw:layer="layout" svg:width="0.9cm" svg:height="0.9cm" svg:x="1.173cm" svg:y="16.839cm">
          <draw:image xlink:href="Pictures/1000000100000200000002000A94AF65.png" xlink:type="simple" xlink:show="embed" xlink:actuate="onLoad" draw:mime-type="image/png">
            <text:p/>
          </draw:image>
        </draw:frame>
        <draw:polygon draw:style-name="gr2" draw:text-style-name="P2" draw:layer="layout" svg:width="0.901cm" svg:height="0.967cm" svg:x="1.172cm" svg:y="15.516cm" svg:viewBox="0 0 902 968" draw:points="0,0 902,0 902,968 0,968">
          <text:p/>
        </draw:polygon>
        <draw:polygon draw:style-name="gr2" draw:text-style-name="P2" draw:layer="layout" svg:width="7.134cm" svg:height="1.197cm" svg:x="2.121cm" svg:y="15.41cm" svg:viewBox="0 0 7135 1198" draw:points="0,0 7135,0 7135,1198 0,1198">
          <text:p/>
        </draw:polygon>
        <draw:frame draw:style-name="gr17" draw:text-style-name="P16" draw:layer="layout" svg:width="12.7cm" svg:height="7.999cm" svg:x="12.065cm" svg:y="9.463cm">
          <draw:image xlink:href="Pictures/1000000100000614000003D4972588BA.png" xlink:type="simple" xlink:show="embed" xlink:actuate="onLoad" draw:mime-type="image/png">
            <text:p/>
          </draw:image>
        </draw:frame>
        <draw:frame draw:style-name="gr18" draw:text-style-name="P17" draw:layer="layout" svg:width="3.448cm" svg:height="0.767cm" svg:x="9.492cm" svg:y="15.635cm">
          <draw:text-box>
            <text:p text:style-name="P3"><text:span text:style-name="T13"><text:s/></text:span><text:span text:style-name="T14">@WINRePo1</text:span></text:p>
          </draw:text-box>
        </draw:frame>
        <draw:frame draw:style-name="gr19" draw:text-style-name="P14" draw:layer="layout" svg:width="10.336cm" svg:height="1.157cm" svg:x="2.344cm" svg:y="13.914cm">
          <draw:text-box>
            <text:p text:style-name="P3"><text:span text:style-name="T7">Submit recommendations</text:span></text:p>
          </draw:text-box>
        </draw:frame>
        <draw:frame draw:style-name="gr20" draw:text-style-name="P18" draw:layer="layout" svg:width="11.883cm" svg:height="0.767cm" svg:x="2.404cm" svg:y="16.827cm">
          <draw:text-box>
            <text:p text:style-name="P3"><text:span text:style-name="T12"><text:a xlink:href="https://www.linkedin.com/groups/12659766" xlink:type="simple">https://www.linkedin.com/groups/12659766</text:a></text:span></text:p>
          </draw:text-box>
        </draw:frame>
        <draw:frame draw:style-name="gr21" draw:text-style-name="P20" draw:layer="layout" svg:width="5.67cm" svg:height="0.767cm" svg:x="2.36cm" svg:y="15.653cm">
          <draw:text-box>
            <text:p text:style-name="P19"><text:span text:style-name="T14">@winrepo.bsky.social</text:span></text:p>
          </draw:text-box>
        </draw:frame>
        <draw:frame draw:style-name="gr17" draw:text-style-name="P16" draw:layer="layout" svg:width="1.074cm" svg:height="0.952cm" svg:x="1.075cm" svg:y="15.557cm">
          <draw:image xlink:href="Pictures/10000001000003B50000034959494731.png" xlink:type="simple" xlink:show="embed" xlink:actuate="onLoad" draw:mime-type="image/png">
            <text:p/>
          </draw:image>
        </draw:frame>
        <draw:frame draw:style-name="gr17" draw:text-style-name="P16" draw:layer="layout" svg:width="0.952cm" svg:height="0.89cm" svg:x="8.625cm" svg:y="15.52cm">
          <draw:image xlink:href="Pictures/10000001000002ED000002BCE9411863.png" xlink:type="simple" xlink:show="embed" xlink:actuate="onLoad" draw:mime-type="image/png">
            <text:p/>
          </draw:image>
        </draw:frame>
        <draw:frame draw:style-name="gr22" draw:text-style-name="P14" draw:layer="layout" svg:width="6.602cm" svg:height="1.157cm" svg:x="2.344cm" svg:y="12.644cm">
          <draw:text-box>
            <text:p text:style-name="P3"><text:span text:style-name="T7">Spread the word</text:span></text:p>
          </draw:text-box>
        </draw:frame>
        <draw:frame draw:style-name="gr23" draw:text-style-name="P21" draw:layer="layout" svg:width="12.7cm" svg:height="4.063cm" svg:x="12.7cm" svg:y="4.623cm">
          <draw:image xlink:href="Pictures/100000010000041D000001517C0CD63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/>
      <style:text-properties style:font-name="Noto Sans1" fo:font-family="'Noto Sans'" style:font-style-name="Regular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81aca6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4-15T18:56:17.073955518</meta:print-date>
    <meta:printed-by>PDF files: Ana Luísa Pinho</meta:printed-by>
    <dc:date>2026-06-01T02:01:48.984736522</dc:date>
    <dc:creator>Ana Luísa Pinho</dc:creator>
    <meta:editing-duration>PT3M24S</meta:editing-duration>
    <meta:editing-cycles>3</meta:editing-cycles>
    <meta:generator>LibreOffice/24.2.7.2$Linux_X86_64 LibreOffice_project/420$Build-2</meta:generator>
    <meta:document-statistic meta:object-count="57"/>
  </office:meta>
</office:document-meta>
</file>